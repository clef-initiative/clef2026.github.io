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FDD800000C020000042B2282F5F3.emf" manifest:media-type="image/x-emf"/>
  <manifest:file-entry manifest:full-path="Pictures/10000001000000FC000000F80911DDBA.png" manifest:media-type="image/png"/>
  <manifest:file-entry manifest:full-path="Pictures/100000010000080000000800F3D2ABE1.png" manifest:media-type="image/png"/>
  <manifest:file-entry manifest:full-path="Pictures/10000001000003FC000001DAABA86F93.png" manifest:media-type="image/png"/>
  <manifest:file-entry manifest:full-path="Pictures/10000001000000AE0000003CE7A5A449.png" manifest:media-type="image/png"/>
  <manifest:file-entry manifest:full-path="Pictures/100031D800004648000020A93F1C4508.pdf" manifest:media-type="application/pd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style:style>
    <style:style style:name="P2" style:family="paragraph" style:parent-style-name="Proceedings_20_title">
      <style:text-properties officeooo:paragraph-rsid="001f4cc7"/>
    </style:style>
    <style:style style:name="P3" style:family="paragraph" style:parent-style-name="Standard_20__28_WW_29_">
      <style:paragraph-properties fo:margin-left="0cm" fo:margin-right="0cm" fo:margin-top="0cm" fo:margin-bottom="0.494cm" style:contextual-spacing="true" fo:line-height="110%" fo:text-indent="0cm" style:auto-text-indent="false" style:writing-mode="lr-tb"/>
    </style:style>
    <style:style style:name="P4" style:family="paragraph" style:parent-style-name="Author_20_First_20_Name">
      <style:paragraph-properties fo:margin-top="0.494cm" fo:margin-bottom="0.494cm" style:contextual-spacing="true"/>
    </style:style>
    <style:style style:name="P5" style:family="paragraph" style:parent-style-name="Abstract_20_Title">
      <style:text-properties style:font-name="Libertinus Sans"/>
    </style:style>
    <style:style style:name="P6" style:family="paragraph" style:parent-style-name="Keywords_20_title">
      <style:text-properties style:font-name="Libertinus Sans"/>
    </style:style>
    <style:style style:name="P7" style:family="paragraph">
      <loext:graphic-properties draw:fill="solid" draw:fill-color="#ffffff"/>
      <style:paragraph-properties fo:text-align="center"/>
    </style:style>
    <style:style style:name="P8" style:family="paragraph" style:parent-style-name="Footnote">
      <style:paragraph-properties fo:margin-top="0cm" fo:margin-bottom="0cm" style:contextual-spacing="false"/>
    </style:style>
    <style:style style:name="P9" style:family="paragraph" style:parent-style-name="Footnote">
      <style:paragraph-properties fo:margin-top="0cm" fo:margin-bottom="0cm" style:contextual-spacing="false" fo:text-align="left" style:justify-single-word="false" fo:orphans="2" fo:widows="2"/>
      <style:text-properties fo:language="en" fo:country="US" style:letter-kerning="false" style:language-complex="ar" style:country-complex="SA"/>
    </style:style>
    <style:style style:name="P10" style:family="paragraph" style:parent-style-name="Copyright_20_message">
      <style:paragraph-properties fo:margin-top="0cm" fo:margin-bottom="0cm" style:contextual-spacing="false" fo:text-align="left" style:justify-single-word="false" fo:orphans="2" fo:widows="2"/>
      <style:text-properties fo:language="en" fo:country="US" style:letter-kerning="false" style:language-complex="ar" style:country-complex="SA"/>
    </style:style>
    <style:style style:name="P11" style:family="paragraph" style:parent-style-name="Heading_20_1">
      <style:text-properties style:font-name="Libertinus San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margin-top="0.494cm" fo:margin-bottom="0.494cm" style:contextual-spacing="true" fo:text-align="justify" style:justify-single-word="false" fo:text-indent="0cm" style:auto-text-indent="false"/>
      <style:text-properties style:font-name="Libertinus Serif" officeooo:paragraph-rsid="00093e83"/>
    </style:style>
    <style:style style:name="P14" style:family="paragraph" style:parent-style-name="Standard">
      <style:paragraph-properties fo:margin-left="0cm" fo:margin-right="0cm" fo:margin-top="0.494cm" fo:margin-bottom="0.494cm" style:contextual-spacing="true" fo:text-align="justify" style:justify-single-word="false" fo:text-indent="0cm" style:auto-text-indent="false"/>
      <style:text-properties style:font-name="Libertinus Serif" officeooo:rsid="00179bbe" officeooo:paragraph-rsid="00093e83" style:font-name-complex="Libertinus Serif2"/>
    </style:style>
    <style:style style:name="P15" style:family="paragraph" style:parent-style-name="Heading_20_2">
      <style:paragraph-properties fo:margin-left="1.401cm" fo:margin-right="0cm" fo:text-indent="-1.401cm" style:auto-text-indent="false"/>
      <style:text-properties style:font-name="Libertinus Sans"/>
    </style:style>
    <style:style style:name="P16" style:family="paragraph" style:parent-style-name="Numbered_20_list" style:list-style-name="WWNum3">
      <style:text-properties officeooo:paragraph-rsid="00093e83"/>
    </style:style>
    <style:style style:name="P17" style:family="paragraph" style:parent-style-name="Numbered_20_list" style:list-style-name="WWNum3"/>
    <style:style style:name="P18" style:family="paragraph" style:parent-style-name="Numbered_20_list" style:list-style-name="WWNum41">
      <style:text-properties officeooo:paragraph-rsid="00093e83"/>
    </style:style>
    <style:style style:name="P19" style:family="paragraph" style:parent-style-name="Standard">
      <style:text-properties officeooo:paragraph-rsid="00093e83"/>
    </style:style>
    <style:style style:name="P20" style:family="paragraph" style:parent-style-name="Numbered_20_list" style:list-style-name="WWNum42">
      <style:text-properties officeooo:paragraph-rsid="000a74d8"/>
    </style:style>
    <style:style style:name="P21" style:family="paragraph" style:parent-style-name="Bulleted_20_List" style:list-style-name="WWNum4"/>
    <style:style style:name="P22" style:family="paragraph" style:parent-style-name="Heading_20_3">
      <style:paragraph-properties fo:margin-left="2.161cm" fo:margin-right="0cm" fo:text-indent="-2.161cm" style:auto-text-indent="false"/>
      <style:text-properties style:font-name="Libertinus Sans"/>
    </style:style>
    <style:style style:name="P23" style:family="paragraph" style:parent-style-name="Table_20_number">
      <style:text-properties style:font-name="Libertinus Sans"/>
    </style:style>
    <style:style style:name="P24" style:family="paragraph" style:parent-style-name="Table_20_caption">
      <style:text-properties style:font-name="Libertinus Sans"/>
    </style:style>
    <style:style style:name="P25"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Libertinus Sans1" fo:font-size="10pt" fo:language="en" fo:country="US" style:letter-kerning="false" style:font-size-asian="10pt" style:font-size-complex="10pt" style:language-complex="ar" style:country-complex="SA"/>
    </style:style>
    <style:style style:name="P26" style:family="paragraph" style:parent-style-name="Standard">
      <style:paragraph-properties fo:margin-left="0cm" fo:margin-right="0cm" fo:margin-top="0cm" fo:margin-bottom="0.423cm" style:contextual-spacing="true" fo:orphans="2" fo:widows="2" fo:text-indent="0cm" style:auto-text-indent="false"/>
      <style:text-properties style:font-name="Libertinus Sans1" fo:font-size="10pt" fo:language="en" fo:country="US" style:letter-kerning="false" style:font-size-asian="10pt" style:font-size-complex="10pt" style:language-complex="ar" style:country-complex="SA"/>
    </style:style>
    <style:style style:name="P27"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Libertinus Sans1" fo:font-size="10pt" fo:language="en" fo:country="US" style:letter-kerning="false" style:font-size-asian="10pt" style:font-name-complex="Cambria Math" style:font-size-complex="10pt" style:language-complex="ar" style:country-complex="SA"/>
    </style:style>
    <style:style style:name="P28" style:family="paragraph" style:parent-style-name="Figure_20_caption">
      <style:text-properties officeooo:paragraph-rsid="0011a95f"/>
    </style:style>
    <style:style style:name="P29"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30"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31" style:family="paragraph" style:parent-style-name="Acknowledgements_20__28_Heading_29_">
      <style:paragraph-properties fo:margin-left="0.635cm" fo:margin-right="0cm" fo:line-height="100%" fo:text-indent="-0.635cm" style:auto-text-indent="false"/>
      <style:text-properties style:font-name="Libertinus Sans"/>
    </style:style>
    <style:style style:name="P32" style:family="paragraph" style:parent-style-name="Acknowledgements_20__28_Heading_29_">
      <style:paragraph-properties fo:margin-left="0.635cm" fo:margin-right="0cm" fo:line-height="100%" fo:text-indent="-0.635cm" style:auto-text-indent="false"/>
      <style:text-properties style:font-name="Libertinus Sans" officeooo:rsid="000cb7ed" officeooo:paragraph-rsid="000cb7ed"/>
    </style:style>
    <style:style style:name="P33" style:family="paragraph" style:parent-style-name="Standard">
      <style:paragraph-properties fo:margin-left="0cm" fo:margin-right="0cm" fo:text-indent="0cm" style:auto-text-indent="false"/>
      <style:text-properties fo:font-style="italic" officeooo:rsid="000cb7ed" officeooo:paragraph-rsid="000cb7ed" style:font-style-asian="italic" style:font-style-complex="italic"/>
    </style:style>
    <style:style style:name="P34" style:family="paragraph" style:parent-style-name="Standard">
      <style:paragraph-properties fo:margin-left="0cm" fo:margin-right="0cm" fo:text-indent="0cm" style:auto-text-indent="false"/>
      <style:text-properties officeooo:paragraph-rsid="000cb7ed"/>
    </style:style>
    <style:style style:name="P35"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36"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7" style:family="paragraph" style:parent-style-name="Standard">
      <style:paragraph-properties fo:margin-left="0cm" fo:margin-right="0cm" fo:text-indent="0cm" style:auto-text-indent="false"/>
      <style:text-properties style:font-name="Libertinus Serif" officeooo:rsid="000cb7ed" officeooo:paragraph-rsid="000cb7ed"/>
    </style:style>
    <style:style style:name="P38" style:family="paragraph" style:parent-style-name="Acknowledgements_20__28_Heading_29_">
      <style:paragraph-properties fo:margin-left="0.635cm" fo:margin-right="0cm" fo:text-indent="-0.635cm" style:auto-text-indent="false"/>
      <style:text-properties style:font-name="Libertinus Sans"/>
    </style:style>
    <style:style style:name="P39" style:family="paragraph" style:parent-style-name="reference" style:list-style-name="WWNum24">
      <style:paragraph-properties fo:margin-left="0.751cm" fo:margin-right="0cm" fo:text-indent="-0.751cm" style:auto-text-indent="false"/>
    </style:style>
    <style:style style:name="P40" style:family="paragraph" style:parent-style-name="reference" style:list-style-name="">
      <style:paragraph-properties fo:margin-left="0.751cm" fo:margin-right="0cm" fo:text-indent="-0.751cm" style:auto-text-indent="false"/>
      <style:text-properties fo:language="sv" fo:country="SE"/>
    </style:style>
    <style:style style:name="P41" style:family="paragraph" style:parent-style-name="Appendix_20__28_WW_29_">
      <style:paragraph-properties fo:margin-left="0cm" fo:text-indent="0cm" style:auto-text-indent="false"/>
    </style:style>
    <style:style style:name="T1" style:family="text">
      <style:text-properties officeooo:rsid="001838c6"/>
    </style:style>
    <style:style style:name="T2" style:family="text">
      <style:text-properties style:font-name-complex="Cambria Math"/>
    </style:style>
    <style:style style:name="T3" style:family="text">
      <style:text-properties style:font-name="Libertinus Serif" style:font-family-complex="LibertinusSerif" style:font-family-generic-complex="system" style:font-pitch-complex="variable"/>
    </style:style>
    <style:style style:name="T4" style:family="text">
      <style:text-properties fo:font-family="'Libertinus Sans'" style:font-family-generic="roman" style:font-pitch="variable" style:font-name-complex="Cambria Math"/>
    </style:style>
    <style:style style:name="T5" style:family="text">
      <style:text-properties fo:font-family="'Libertinus Sans'" style:font-family-generic="roman" style:font-pitch="variable" officeooo:rsid="001a164c" style:font-name-complex="Cambria Math"/>
    </style:style>
    <style:style style:name="T6" style:family="text">
      <style:text-properties fo:color="#000000" loext:opacity="100%" style:text-position="super 58%" fo:font-style="italic" style:font-style-asian="italic" style:font-style-complex="italic"/>
    </style:style>
    <style:style style:name="T7" style:family="text">
      <style:text-properties fo:color="#000000" loext:opacity="100%" style:text-position="super 58%"/>
    </style:style>
    <style:style style:name="T8" style:family="text">
      <style:text-properties style:use-window-font-color="true" loext:opacity="0%"/>
    </style:style>
    <style:style style:name="T9" style:family="text">
      <style:text-properties fo:color="#000000" loext:opacity="100%" style:text-position="super 58%" fo:font-style="italic" style:font-style-asian="italic"/>
    </style:style>
    <style:style style:name="T10" style:family="text">
      <style:text-properties fo:color="#000000" loext:opacity="100%" style:text-position="super 58%" style:font-style-complex="italic"/>
    </style:style>
    <style:style style:name="T11" style:family="text">
      <style:text-properties style:text-position="33% 100%"/>
    </style:style>
    <style:style style:name="T12" style:family="text">
      <style:text-properties style:text-position="super 58%"/>
    </style:style>
    <style:style style:name="T13" style:family="text">
      <style:text-properties officeooo:rsid="0008fe9c"/>
    </style:style>
    <style:style style:name="T14" style:family="text">
      <style:text-properties style:text-position="0% 100%"/>
    </style:style>
    <style:style style:name="T15" style:family="text">
      <style:text-properties fo:color="#ffffff" loext:opacity="100%" style:text-position="0% 100%"/>
    </style:style>
    <style:style style:name="T16" style:family="text">
      <style:text-properties fo:color="#7f7f7f" loext:opacity="100%"/>
    </style:style>
    <style:style style:name="T17" style:family="text">
      <style:text-properties officeooo:rsid="001aa872"/>
    </style:style>
    <style:style style:name="T18" style:family="text">
      <style:text-properties style:font-family-complex="LibertinusSerif" style:font-family-generic-complex="system" style:font-pitch-complex="variable"/>
    </style:style>
    <style:style style:name="T19" style:family="text">
      <style:text-properties style:font-name-complex="Libertinus Serif2"/>
    </style:style>
    <style:style style:name="T20" style:family="text">
      <style:text-properties officeooo:rsid="00179bbe" style:font-name-complex="Libertinus Serif2"/>
    </style:style>
    <style:style style:name="T21" style:family="text">
      <style:text-properties officeooo:rsid="000b6a58"/>
    </style:style>
    <style:style style:name="T22" style:family="text">
      <style:text-properties style:font-name="Libertinus Serif" officeooo:rsid="001838c6" style:font-family-complex="LibertinusSerif" style:font-family-generic-complex="system" style:font-pitch-complex="variable"/>
    </style:style>
    <style:style style:name="T23" style:family="text">
      <style:text-properties style:font-name="LibertinusSerif" style:font-family-complex="LibertinusSerif" style:font-family-generic-complex="system" style:font-pitch-complex="variable"/>
    </style:style>
    <style:style style:name="T24" style:family="text">
      <style:text-properties style:font-name="LibertinusSerif" officeooo:rsid="0011a95f" style:font-family-complex="LibertinusSerif" style:font-family-generic-complex="system" style:font-pitch-complex="variable"/>
    </style:style>
    <style:style style:name="T25" style:family="text">
      <style:text-properties style:font-name="LibertinusSerif" officeooo:rsid="001838c6" style:font-family-complex="LibertinusSerif" style:font-family-generic-complex="system" style:font-pitch-complex="variable"/>
    </style:style>
    <style:style style:name="T26" style:family="text">
      <style:text-properties fo:font-family="'Cambria Math'" style:font-family-generic="roman" style:font-pitch="variable" style:font-name-complex="Cambria Math"/>
    </style:style>
    <style:style style:name="T27" style:family="text">
      <style:text-properties officeooo:rsid="0011a95f"/>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style:font-name="Libertinus Sans" fo:font-weight="bold" style:font-weight-asian="bold" style:font-weight-complex="bold"/>
    </style:style>
    <style:style style:name="T31" style:family="text">
      <style:text-properties style:font-name="Libertinus Sans"/>
    </style:style>
    <style:style style:name="T32" style:family="text">
      <style:text-properties style:font-name="Libertinus Sans" officeooo:rsid="0012d2c4"/>
    </style:style>
    <style:style style:name="T33" style:family="text">
      <style:text-properties officeooo:rsid="000cb7ed"/>
    </style:style>
    <style:style style:name="T34" style:family="text">
      <style:text-properties officeooo:rsid="000cd0e5"/>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9" style:family="text">
      <style:text-properties fo:language="fi" fo:country="FI"/>
    </style:style>
    <style:style style:name="T40" style:family="text">
      <style:text-properties fo:language="sv" fo:country="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 <text:span text:style-name="T1">using LibreOffice</text:span><text:span text:style-name="T2"><text:note text:id="ftn1" text:note-class="footnote"><text:note-citation text:label="⋆">⋆</text:note-citation><text:note-body><text:p text:style-name="P2">CLEF 2026 Working Notes, 21 <text:span text:style-name="T3">—</text:span> 24 September 2026, Jena, Germany</text:p><text:p text:style-name="Footnote"><text:span text:style-name="Footnote_20_Symbol">⋆</text:span> You should use this document as the template for preparing your publication. We recommend using the latest version of the CEURART style.</text:p></text:note-body></text:note></text:span></text:p>
      <text:p text:style-name="P3" loext:marker-style-name="T4"><text:span text:style-name="T4">&lt;Lab name&gt; at CLEF 202</text:span><text:span text:style-name="T5">6</text:span></text:p>
      <text:p text:style-name="P4">Aleksandr <text:span text:style-name="Author_20_Last_20_Name_20_Char">Ometov</text:span><text:span text:style-name="T6">1,</text:span><text:span text:style-name="T7">†</text:span><text:span text:style-name="T8">,</text:span> Tiago Prince <text:span text:style-name="Author_20_Last_20_Name_20_Char">Sales</text:span><text:span text:style-name="T9">2</text:span><text:span text:style-name="T10">,∗,†</text:span><text:span text:style-name="T11"> </text:span><text:span text:style-name="Author_20_Last_20_Name_20_Char">and </text:span>Manfred <text:span text:style-name="Author_20_Last_20_Name_20_Char">Jeusfeld</text:span><text:span text:style-name="T9">3,</text:span><text:span text:style-name="T10">†</text:span></text:p>
      <text:p text:style-name="University"><text:span text:style-name="T12">1</text:span> Tampere University of Applied Sciences, Kalevantie 4 33100 Tampere, Finland </text:p>
      <text:p text:style-name="University"><text:span text:style-name="T12">2</text:span> University of Twente, Drienerlolaan 5, 7522 NB, Enschede, The Netherlands </text:p>
      <text:p text:style-name="University"><text:span text:style-name="T12">3</text:span> University of Skövde, Högskolevägen 1, 541 28 Skövde, Sweden </text:p>
      <text:p text:style-name="University"/>
      <text:p text:style-name="P5">Abstract</text:p>
      <text:p text:style-name="Abstract_20_Text">A clear and well-documented <text:span text:style-name="T13">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P6">Keywords </text:p>
      <text:p text:style-name="Keywords_20_words">paper template, paper formatting, CEUR-WS<text:span text:style-name="Footnote_20_Symbol"><text:span text:style-name="T14"> </text:span></text:span><text:span text:style-name="T15"><text:note text:id="ftn2" text:note-class="footnote"><text:note-citation>1</text:note-citation><text:note-body><text:p text:style-name="Footnote"><text:span text:style-name="T12">∗ </text:span>Corresponding author.</text:p><text:p text:style-name="Footnote"><text:span text:style-name="T12">† </text:span>These authors contributed equally.</text:p><text:p text:style-name="Footnote"><draw:frame text:anchor-type="as-char" draw:z-index="1" draw:name="Form1" draw:style-name="gr1" draw:text-style-name="P7" svg:width="0.309cm" svg:height="0.309cm"><draw:image xlink:href="Pictures/10000001000000FC000000F80911DDBA.png" xlink:type="simple" xlink:show="embed" xlink:actuate="onLoad" draw:mime-type="image/png"><text:p/></draw:image></draw:frame><text:s/><text:span text:style-name="Internet_20_link">aleksandr.ometov@tuni.fi</text:span><text:span text:style-name="T16">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2"><draw:image xlink:href="Pictures/100000010000080000000800F3D2ABE1.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8"><draw:frame draw:style-name="fr2" draw:name="Rahmen1" text:anchor-type="as-char" svg:width="14.944cm" draw:z-index="3"><draw:text-box fo:min-height="0.041cm"><table:table table:name="Tabelle2" table:style-name="Tabelle2"><table:table-column table:style-name="Tabelle2.A"/><table:table-column table:style-name="Tabelle2.B"/><table:table-row table:style-name="Tabelle2.1"><table:table-cell table:style-name="Tabelle2.A1" office:value-type="string"><text:p text:style-name="P9"><draw:frame draw:style-name="fr1" draw:name="Bild2" text:anchor-type="as-char" svg:width="1.295cm" svg:height="0.457cm" draw:z-index="4"><draw:image xlink:href="Pictures/1000FDD800000C020000042B2282F5F3.emf" xlink:type="simple" xlink:show="embed" xlink:actuate="onLoad" draw:mime-type="image/x-emf"/><draw:image xlink:href="Pictures/10000001000000AE0000003CE7A5A449.png" xlink:type="simple" xlink:show="embed" xlink:actuate="onLoad" draw:mime-type="image/png"/></draw:frame></text:p></table:table-cell><table:table-cell table:style-name="Tabelle2.B1" office:value-type="string"><text:p text:style-name="P10">© 202<text:span text:style-name="T17">6</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11" text:outline-level="1">Introduction</text:h>
      <text:p text:style-name="P12">CEUR-WS’s <text:span text:style-name="T13">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11" text:outline-level="1">Modifications</text:h>
      <text:p text:style-name="P13"><text:span text:style-name="T18">Modifying the template — including but not limited to: adjusting margins, typeface sizes, line spacing, paragraph and list definitions — is not allowed. </text:span><text:bookmark-start text:name="_Hlk168929516"/><text:bookmark-start text:name="_GoBack"/><text:span text:style-name="T19">While we provide a LibreOffice template, we strongly recommend authors to use our LaTeX template.</text:span><text:bookmark-end text:name="_Hlk168929516"/><text:bookmark-end text:name="_GoBack"/><text:span text:style-name="T19"> </text:span><text:span text:style-name="T20">We no longer provide a Word/M365 template since Word/M365 cannot reliably export readable PDF files with Libertinus fonts. Likewise, do not use web-based text processors for producing the final paper since they may also fail to handle Libertinus fonts correctly.</text:span></text:p>
      <text:p text:style-name="P14"/>
      <text:p text:style-name="P14"/>
      <text:h text:style-name="P11" text:outline-level="1"><text:soft-page-break/>Installing the Libertinus fonts</text:h>
      <text:p text:style-name="P12">CEURART uses the Libertinus fonts. You may have to install these fonts on your computer. The text below shows how to locally install them.</text:p>
      <text:h text:style-name="P15" text:outline-level="2">Libertinus fonts for Linux</text:h>
      <text:list xml:id="list782332492" text:style-name="WWNum3">
        <text:list-item>
          <text:p text:style-name="P16">Download the latest Libertinus zip file from the repository at https://github.com/alerque/libertinus/releases.</text:p>
        </text:list-item>
        <text:list-item>
          <text:p text:style-name="P17">Extract the files to a temporary directory, e.g. ~/Downloads/Libertinus-7</text:p>
        </text:list-item>
        <text:list-item>
          <text:p text:style-name="P17">Make sure that a directory ~/.local/share/fonts exists.</text:p>
        </text:list-item>
        <text:list-item>
          <text:p text:style-name="P17">Copy the Libertinus fonts: cp ~/Downloads/Libertinus-7/static/OTF/*.otf ~/.local/share/fonts</text:p>
        </text:list-item>
        <text:list-item>
          <text:p text:style-name="P17">The fonts should now be installed.</text:p>
        </text:list-item>
      </text:list>
      <text:h text:style-name="P15" text:outline-level="2">Libertinus fonts for Windows</text:h>
      <text:list xml:id="list134323452744192" text:continue-list="list782332492" text:style-name="WWNum41">
        <text:list-item text:start-value="1">
          <text:p text:style-name="P18">Download the latest Libertinus zip file <text:span text:style-name="Internet_20_link">from the repository at https://github.com/alerque/libertinus/releases.</text:span></text:p>
        </text:list-item>
        <text:list-item text:style-override="WWNum3">
          <text:p text:style-name="P17">Extract the files to a temporary directory, e.g. C:\\users\&lt;username&gt;\Downloads\Libertinus-7</text:p>
        </text:list-item>
        <text:list-item text:style-override="WWNum3">
          <text:p text:style-name="P17">Open the Windows 10 “Settings” from the Start menu and switch to the Personalization / Fonts it should display the currently installed fonts, each as a directory.</text:p>
        </text:list-item>
        <text:list-item text:style-override="WWNum3">
          <text:p text:style-name="P17">Navigate to the directory C:\\users\&lt;username&gt;\Downloads\Libertinus-7\Downloads\Libertinus-7\static\OTF </text:p>
        </text:list-item>
        <text:list-item text:style-override="WWNum3">
          <text:p text:style-name="P17">Select all files with extension .otf and drag and drop them to the field “Drag and drop to install” of the selected settings menu.</text:p>
        </text:list-item>
        <text:list-item text:style-override="WWNum3">
          <text:p text:style-name="P17">Close the windows; the fonts should now be installed.</text:p>
        </text:list-item>
      </text:list>
      <text:p text:style-name="P19">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9"><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5" text:outline-level="2">Libertinus fonts for macOS</text:h>
      <text:list xml:id="list134323346786619" text:continue-list="list134323452744192" text:style-name="WWNum42">
        <text:list-item text:start-value="1">
          <text:p text:style-name="P20">Download the latest Libertinus zip file <text:span text:style-name="T21">from</text:span> <text:span text:style-name="Internet_20_link">https://github.com/alerque/libertinus/releases</text:span>.</text:p>
        </text:list-item>
        <text:list-item text:style-override="WWNum3">
          <text:p text:style-name="P17">Extract the files to a temporary directory, e.g. ~/Downloads/Libertinus-7</text:p>
        </text:list-item>
        <text:list-item text:style-override="WWNum3">
          <text:p text:style-name="P17">Open the Font Book app.</text:p>
        </text:list-item>
        <text:list-item text:style-override="WWNum3">
          <text:p text:style-name="P17">Navigate to the directory e.g. ~/Downloads/Libertinus-7/static/OTF</text:p>
        </text:list-item>
        <text:list-item text:style-override="WWNum3">
          <text:p text:style-name="P17">Drag and drop all .otf files to the Font Book window.</text:p>
        </text:list-item>
        <text:list-item text:style-override="WWNum3">
          <text:p text:style-name="P17">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11" text:outline-level="1">Front matter</text:h>
      <text:h text:style-name="P15" text:outline-level="2">Title information</text:h>
      <text:p text:style-name="P12">For each proceedings volume published with CEUR-WS, the titles of its papers should either all use the emphasizing capitalized style or the regular English (or native language) style. Check with the editors of your volume which style you should adopt. </text:p>
      <text:p text:style-name="P12"><text:s/></text:p>
      <text:p text:style-name="Standard"><text:soft-page-break/><text:span text:style-name="T3">Do not insert line breaks in your title </text:span><text:span text:style-name="T22">and keep the title left aligned</text:span><text:span text:style-name="T3">.</text:span><text:span text:style-name="T23"> </text:span><text:span text:style-name="T24">The title </text:span><text:span text:style-name="T25">font</text:span><text:span text:style-name="T24"> shall be Libertinus Sans.</text:span></text:p>
      <text:h text:style-name="P15" text:outline-level="2">Authors and affiliations</text:h>
      <text:p text:style-name="P12">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1">affiliation mark: a superscript number following the author’s last name.</text:p>
        </text:list-item>
      </text:list>
      <text:p text:style-name="Standard">The author names and affiliations could be formatted in two ways:</text:p>
      <text:list xml:id="list134324764029760" text:continue-numbering="true" text:style-name="WWNum4">
        <text:list-item>
          <text:p text:style-name="P21">Group the authors per affiliation.</text:p>
        </text:list-item>
        <text:list-item>
          <text:p text:style-name="P21">Use an explicit mark to indicate the affiliations.</text:p>
        </text:list-item>
      </text:list>
      <text:h text:style-name="P15" text:outline-level="2">Keywords</text:h>
      <text:p text:style-name="Standard">Keywords should be separated by commas.</text:p>
      <text:h text:style-name="P15" text:outline-level="2">Various marks in the front matter</text:h>
      <text:p text:style-name="P12">The front matter becomes complicated due to various kinds of notes and marks to the title and author names. footnotes are denoted by super scripted Arabic numerals, corresponding author by a Conformal asterisk (*) mark.</text:p>
      <text:h text:style-name="P22" text:outline-level="3">Title marks</text:h>
      <text:p text:style-name="P12">Marks in the title should be denoted by a star (<text:span text:style-name="T26">⋆</text:span>) mark.</text:p>
      <text:h text:style-name="P22" text:outline-level="3">Author marks</text:h>
      <text:p text:style-name="P12">Author names can have some kinds of marks and notes:</text:p>
      <text:list xml:id="list134323792690307" text:continue-numbering="true" text:style-name="WWNum4">
        <text:list-item>
          <text:p text:style-name="P21">corresponding author mark: a superscript asterisk (<text:span text:style-name="T10">∗</text:span>) after the affiliation mark(s)</text:p>
        </text:list-item>
        <text:list-item>
          <text:p text:style-name="P21">equal contribution mark: a superscript dagger (<text:span text:style-name="T12">†</text:span>) after the corresponding author mark or the affiliation mark.</text:p>
        </text:list-item>
      </text:list>
      <text:h text:style-name="P22" text:outline-level="3">Other marks</text:h>
      <text:p text:style-name="Standard">At times, authors want footnotes which leave no marks in the author names. The note text shall be listed as part of the front matter notes.</text:p>
      <text:h text:style-name="P11" text:outline-level="1">Sections</text:h>
      <text:p text:style-name="P12">You should use the pre-defined styles for sections (Heading 1), subsections (Heading 2), and subsubsections (Heading 3). </text:p>
      <text:p text:style-name="Standard">There should be no empty lines before section headings. The template already adds the necessary spacing before them. <text:span text:style-name="T27">Sections and subsection headings shall be in Libertinus Sans. The body text and footnotes shall be in Libertinus Serif.</text:span></text:p>
      <text:h text:style-name="P11" text:outline-level="1">Paragraphs</text:h>
      <text:p text:style-name="P12">Paragraphs should be indented except for the first paragraph after a section, subsection, or subsubsection, which should not. </text:p>
      <text:p text:style-name="Standard"><text:soft-page-break/>The default style for paragraphs is called <text:span text:style-name="T28">Normal</text:span>. First paragraphs should be styled with <text:span text:style-name="T28">Normal (non-indented)</text:span>. </text:p>
      <text:h text:style-name="P11" text:outline-level="1">Lists</text:h>
      <text:p text:style-name="P12">Here is an example of a numbered list:</text:p>
      <text:list text:continue-list="list134323346786619" text:style-name="WWNum3">
        <text:list-item>
          <text:p text:style-name="P17">Item 1</text:p>
        </text:list-item>
        <text:list-item>
          <text:p text:style-name="P17">Item 2</text:p>
        </text:list-item>
        <text:list-item>
          <text:p text:style-name="P17">Item 3</text:p>
        </text:list-item>
      </text:list>
      <text:p text:style-name="Standard">Here is an example of a bulleted list:</text:p>
      <text:list xml:id="list134324209392176" text:continue-list="list134323792690307" text:style-name="WWNum4">
        <text:list-item>
          <text:p text:style-name="P21">Item 1</text:p>
        </text:list-item>
        <text:list-item>
          <text:p text:style-name="P21">Item 2</text:p>
        </text:list-item>
        <text:list-item>
          <text:p text:style-name="P21">Item 3</text:p>
        </text:list-item>
      </text:list>
      <text:h text:style-name="P11" text:outline-level="1">Tables</text:h>
      <text:p text:style-name="P12">In this section, you can find an example of table styling. Note that captions are placed <text:span text:style-name="T29">above</text:span> tables. It is recommended to add cross references to tables, i.e., please, check <text:bookmark-ref text:reference-format="text" text:ref-name="_Ref37069322">Table 1</text:bookmark-ref>. </text:p>
      <text:p text:style-name="Standard"><text:span text:style-name="T27">The table caption is in Libertinus Sans. </text:span>The style of texts within tables should be <text:span text:style-name="T27">Libertinus S</text:span><text:span text:style-name="T1">ans as well</text:span>.</text:p>
      <text:p text:style-name="P23"><text:bookmark-start text:name="_Ref37069322"/>Table <text:sequence text:ref-name="refTable0" text:name="Table" text:formula="ooow:Table+1" style:num-format="1">1</text:sequence><text:bookmark-end text:name="_Ref37069322"/></text:p>
      <text:p text:style-name="P24">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5">Non-English or Math</text:p>
          </table:table-cell>
          <table:table-cell table:style-name="Tabelle3.A1" office:value-type="string">
            <text:p text:style-name="P25">Frequency</text:p>
          </table:table-cell>
          <table:table-cell table:style-name="Tabelle3.A1" office:value-type="string">
            <text:p text:style-name="P26">Comments</text:p>
          </table:table-cell>
        </table:table-row>
        <table:table-row table:style-name="Tabelle3.1">
          <table:table-cell table:style-name="Tabelle3.A2" office:value-type="string">
            <text:p text:style-name="P25">Ø</text:p>
          </table:table-cell>
          <table:table-cell table:style-name="Tabelle3.A2" office:value-type="string">
            <text:p text:style-name="P25">1 in 1,000</text:p>
          </table:table-cell>
          <table:table-cell table:style-name="Tabelle3.A2" office:value-type="string">
            <text:p text:style-name="P26">For Swedish names</text:p>
          </table:table-cell>
        </table:table-row>
        <table:table-row table:style-name="Tabelle3.1">
          <table:table-cell table:style-name="Tabelle3.A3" office:value-type="string">
            <text:p text:style-name="P27">𝜋</text:p>
          </table:table-cell>
          <table:table-cell table:style-name="Tabelle3.A3" office:value-type="string">
            <text:p text:style-name="P25">1 in 5</text:p>
          </table:table-cell>
          <table:table-cell table:style-name="Tabelle3.A3" office:value-type="string">
            <text:p text:style-name="P26">Common in math</text:p>
          </table:table-cell>
        </table:table-row>
        <table:table-row table:style-name="Tabelle3.1">
          <table:table-cell table:style-name="Tabelle3.A3" office:value-type="string">
            <text:p text:style-name="P25">$</text:p>
          </table:table-cell>
          <table:table-cell table:style-name="Tabelle3.A3" office:value-type="string">
            <text:p text:style-name="P25">4 in 5</text:p>
          </table:table-cell>
          <table:table-cell table:style-name="Tabelle3.A3" office:value-type="string">
            <text:p text:style-name="P26">Used in business</text:p>
          </table:table-cell>
        </table:table-row>
        <table:table-row table:style-name="Tabelle3.1">
          <table:table-cell table:style-name="Tabelle3.A5" office:value-type="string">
            <text:p text:style-name="P25">Ψ</text:p>
          </table:table-cell>
          <table:table-cell table:style-name="Tabelle3.A5" office:value-type="string">
            <text:p text:style-name="P25">1 in 40,000</text:p>
          </table:table-cell>
          <table:table-cell table:style-name="Tabelle3.A5" office:value-type="string">
            <text:p text:style-name="P26">Unexplained usage</text:p>
          </table:table-cell>
        </table:table-row>
      </table:table>
      <text:h text:style-name="P11" text:outline-level="1">Figures</text:h>
      <text:p text:style-name="P12">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 <text:span text:style-name="T27">Figure captions are in Libertinus Sans.</text:span></text:p>
      <text:p text:style-name="Figure"><text:soft-page-break/><draw:frame draw:style-name="fr3" draw:name="Picture 10" text:anchor-type="as-char" svg:y="-4.741cm" svg:width="12.848cm" svg:height="5.475cm" draw:z-index="0"><draw:image xlink:href="Pictures/100031D800004648000020A93F1C4508.pdf" xlink:type="simple" xlink:show="embed" xlink:actuate="onLoad" draw:mime-type="application/pdf"/><draw:image xlink:href="Pictures/10000001000003FC000001DAABA86F93.png" xlink:type="simple" xlink:show="embed" xlink:actuate="onLoad" draw:mime-type="image/png"/></draw:frame></text:p>
      <text:p text:style-name="P28"><text:bookmark-start text:name="_Ref37070663"/><text:span text:style-name="T30">Figure </text:span><text:span text:style-name="T30"><text:sequence text:ref-name="refFigure0" text:name="Figure" text:formula="ooow:Figure+1" style:num-format="1">1</text:sequence></text:span><text:bookmark-end text:name="_Ref37070663"/><text:span text:style-name="T30">:</text:span><text:span text:style-name="T31"> </text:span><text:span text:style-name="T32">Chart about Wikidata (source: freesvg.org/1438642735, </text:span><text:span text:style-name="T31">license: </text:span><text:span text:style-name="T32">public domain</text:span><text:span text:style-name="Figure_20_caption_20_Char"><text:span text:style-name="T31">).</text:span></text:span></text:p>
      <text:h text:style-name="P11" text:outline-level="1">Equations</text:h>
      <text:p text:style-name="P12">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29"><draw:frame draw:style-name="fr4" draw:name="Objekt1" text:anchor-type="as-char" svg:width="1.506cm" svg:height="0.529cm"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30">(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11" text:outline-level="1">Citations and bibliographies</text:h>
      <text:p text:style-name="P12">The references should be formatted according to the following guidelines: </text:p>
      <text:list text:continue-numbering="true" text:style-name="WWNum4">
        <text:list-item>
          <text:p text:style-name="P21">A paginated journal article [<text:span text:style-name="Internet_20_link">2</text:span>].</text:p>
        </text:list-item>
        <text:list-item>
          <text:p text:style-name="P21">An enumerated journal article [<text:span text:style-name="Internet_20_link">3</text:span>].</text:p>
        </text:list-item>
        <text:list-item>
          <text:p text:style-name="P21">A reference to an entire issue [<text:span text:style-name="Internet_20_link">4</text:span>].</text:p>
        </text:list-item>
        <text:list-item>
          <text:p text:style-name="P21">A monograph (whole book) [<text:span text:style-name="Internet_20_link">5</text:span>].</text:p>
        </text:list-item>
        <text:list-item>
          <text:p text:style-name="P21">A monograph/whole book in a series (see 2a in spec. document) [<text:span text:style-name="Internet_20_link">6</text:span>].</text:p>
        </text:list-item>
        <text:list-item>
          <text:p text:style-name="P21">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1">A chapter in a divisible book [<text:span text:style-name="Internet_20_link">9</text:span>].</text:p>
        </text:list-item>
        <text:list-item>
          <text:p text:style-name="P21">A chapter in a divisible book in a series [<text:span text:style-name="Internet_20_link">10</text:span>].</text:p>
        </text:list-item>
        <text:list-item>
          <text:p text:style-name="P21">A multi-volume work as book [<text:span text:style-name="Internet_20_link">11</text:span>].</text:p>
        </text:list-item>
        <text:list-item>
          <text:p text:style-name="P21">An article in a proceedings (of a conference, symposium, workshop for example) (paginated proceedings article) [<text:span text:style-name="Internet_20_link">12</text:span>].</text:p>
        </text:list-item>
        <text:list-item>
          <text:p text:style-name="P21">A proceedings article with all possible elements [<text:span text:style-name="Internet_20_link">13</text:span>].</text:p>
        </text:list-item>
        <text:list-item>
          <text:p text:style-name="P21">An example of an enumerated proceedings article [<text:span text:style-name="Internet_20_link">14</text:span>].</text:p>
        </text:list-item>
        <text:list-item>
          <text:p text:style-name="P21">An informally published work [<text:span text:style-name="Internet_20_link">15]</text:span>.</text:p>
        </text:list-item>
        <text:list-item>
          <text:p text:style-name="P21">A doctoral dissertation [<text:span text:style-name="Internet_20_link">16</text:span>].</text:p>
        </text:list-item>
        <text:list-item>
          <text:p text:style-name="P21">A master’s thesis: [<text:span text:style-name="Internet_20_link">17</text:span>].</text:p>
        </text:list-item>
        <text:list-item>
          <text:p text:style-name="P21">An online document / world wide web resource [<text:span text:style-name="Internet_20_link">18</text:span>, <text:span text:style-name="Internet_20_link">19</text:span>].</text:p>
        </text:list-item>
        <text:list-item>
          <text:p text:style-name="P21">A video game (Case 1) [<text:span text:style-name="Internet_20_link">20</text:span>] and (Case 2) [<text:span text:style-name="Internet_20_link">21</text:span>] and [<text:span text:style-name="Internet_20_link">22</text:span>] and (Case 3). </text:p>
        </text:list-item>
        <text:list-item>
          <text:p text:style-name="P21">A patent [<text:span text:style-name="Internet_20_link">23</text:span>].</text:p>
        </text:list-item>
        <text:list-item>
          <text:p text:style-name="P21">Work accepted for publication [<text:span text:style-name="Internet_20_link">24</text:span>]</text:p>
        </text:list-item>
        <text:list-item>
          <text:p text:style-name="P21">Prolific author [<text:span text:style-name="Internet_20_link">25</text:span>] and [<text:span text:style-name="Internet_20_link">26</text:span>]. </text:p>
        </text:list-item>
        <text:list-item>
          <text:p text:style-name="P21"><text:soft-page-break/>Other cites might contain ‘duplicate’ DOI and URLs (some SIAM articles) [<text:span text:style-name="Internet_20_link">27</text:span>]. </text:p>
        </text:list-item>
        <text:list-item>
          <text:p text:style-name="P21">Multi-volume works as books [<text:span text:style-name="Internet_20_link">28</text:span>] and [<text:span text:style-name="Internet_20_link">29</text:span>]. </text:p>
        </text:list-item>
        <text:list-item>
          <text:p text:style-name="P21">A couple of citations with DOIs: [<text:span text:style-name="Internet_20_link">30</text:span>, <text:span text:style-name="Internet_20_link">27</text:span>]. </text:p>
        </text:list-item>
        <text:list-item>
          <text:p text:style-name="P21">Online citations: [<text:span text:style-name="Internet_20_link">31</text:span>, <text:span text:style-name="Internet_20_link">18</text:span>, <text:span text:style-name="Internet_20_link">32</text:span>, <text:span text:style-name="Internet_20_link">33</text:span>]. </text:p>
        </text:list-item>
      </text:list>
      <text:h text:style-name="P11" text:outline-level="1">Appendices</text:h>
      <text:p text:style-name="P12">Appendices should be added after the references. Note that in the appendix, sections are lettered, not numbered.</text:p>
      <text:h text:style-name="P31" text:outline-level="1">Acknowledgements</text:h>
      <text:p text:style-name="P12">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33">m</text:span>pere University of Applied Sciences, FI). The template is made available under a Creative Commons License Attribution-ShareAlike 4.0 International (CC BY-SA 4.0).</text:p>
      <text:h text:style-name="P32" text:outline-level="1">Declaration on Generative AI</text:h>
      <text:p text:style-name="P33">Either:</text:p>
      <text:p text:style-name="P34"><text:span text:style-name="T34">The author(s)</text:span><text:bookmark text:name="docs-internal-guid-58575a14-7fff-806e-686a-1acba85d7f70"/><text:span text:style-name="T34"> </text:span><text:span text:style-name="T33">have n</text:span><text:span text:style-name="T35">ot employed any Generative AI tools.</text:span></text:p>
      <text:p text:style-name="P35"/>
      <text:p text:style-name="P36">Or (by using the activity taxonomy in ceur-ws.org/genai-tax.html):</text:p>
      <text:p text:style-name="P37"><text:span text:style-name="T36">During the preparation of this work, the author(s) used X-GPT-4 and Gramby in order to: </text:span><text:span text:style-name="T37">Grammar and spelling check</text:span><text:span text:style-name="T36">. Further, the author(s) used X-AI-IMG for figures 3 and 4 in order to: </text:span><text:span text:style-name="T37">Generate images</text:span><text:span text:style-name="T36">. After using these tool(s)/service(s), the author(s) reviewed and edited the content as needed and take(s) full responsibility for the publication’s content.</text:span><text:span text:style-name="T38"> </text:span></text:p>
      <text:h text:style-name="P38" text:outline-level="1">References</text:h>
      <text:list text:style-name="WWNum24">
        <text:list-item>
          <text:p text:style-name="P39"><text:span text:style-name="T39">Wang, Xin, Tapani Ahonen, and Jari Nurmi. </text:span>"Applying CDMA technique to network-on-chip." IEEE transactions on very large scale integration (VLSI) systems 15.10 (2007): 1091-1100.</text:p>
        </text:list-item>
        <text:list-item>
          <text:p text:style-name="P39">P. S. Abril, R. Plant, The patent holder’s dilemma: Buy, sell, or troll?, Communications of the ACM 50 (2007) 36–44. doi:10.1145/1188913.1188915. </text:p>
        </text:list-item>
        <text:list-item>
          <text:p text:style-name="P39">S. Cohen, W. Nutt, Y. Sagic, Deciding equivalances among conjunctive aggregate queries, J. ACM 54 (2007). doi:10.1145/1219092.1219093. </text:p>
        </text:list-item>
        <text:list-item>
          <text:p text:style-name="P39">J. Cohen (Ed.), Special issue: Digital Libraries, volume 39, 1996. </text:p>
        </text:list-item>
        <text:list-item>
          <text:p text:style-name="P39">D. Kosiur, Understanding Policy-Based Networking, 2nd. ed., Wiley, New York, NY, 2001. </text:p>
        </text:list-item>
        <text:list-item>
          <text:p text:style-name="P39">D. Harel, First-Order Dynamic Logic, volume 68 of Lecture Notes in Computer Science, Springer-Verlag, New York, NY, 1979. doi:10.1007/3-540-09237-4. </text:p>
        </text:list-item>
        <text:list-item>
          <text:p text:style-name="P39">I. Editor (Ed.), The title of book one, volume 9 of The name of the series one, 1st. ed., University of Chicago Press, Chicago, 2007. doi:10.1007 3-540-09237-4. </text:p>
        </text:list-item>
        <text:list-item>
          <text:p text:style-name="P39">I. Editor (Ed.), The title of book two, The name of the series two, 2nd. ed., University of Chicago Press, Chicago, 2008. doi:10.1007/3-540-09237-4. </text:p>
        </text:list-item>
        <text:list-item>
          <text:p text:style-name="P39">A. Z. Spector, Achieving application requirements, in: S. Mullender (Ed.), Distributed Systems, 2nd. ed., ACM Press, New York, NY, 1990, pp. 19–33. doi:10.1145/90417. 90738. </text:p>
        </text:list-item>
        <text:list-item>
          <text:p text:style-name="P39"><text:soft-page-break/>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9">D. E. Knuth, The Art of Computer Programming, Vol. 1: Fundamental Algorithms (3rd. ed.), Addison Wesley Longman Publishing Co., Inc., 1997. </text:p>
        </text:list-item>
        <text:list-item>
          <text:p text:style-name="P39">S. Andler, Predicate path expressions, in: Proceedings of the 6th. ACM SIGACT-SIGPLAN symposium on Principles of Programming Languages, POPL ’79, ACM Press, New York, NY, 1979, pp. 226–236. doi:10.1145/567752.567774. </text:p>
        </text:list-item>
        <text:list-item>
          <text:p text:style-name="P39">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9">M. V. Gundy, D. Balzarotti, G. Vigna, Catch me, if you can: Evading network signatures with web-based polymorphic worms, in: Proceedings of the first USENIX workshop on O<text:span text:style-name="T26">ff</text:span>ensive Technologies, WOOT ’07, USENIX Association, Berkley, CA, 2007. </text:p>
        </text:list-item>
        <text:list-item>
          <text:p text:style-name="P39">D. Harel, LOGICS of Programs: AXIOMATICS and DESCRIPTIVE POWER, MIT Research Lab Technical Report TR-200, Massachusetts Institute of Technology, Cambridge, MA, 1978. </text:p>
        </text:list-item>
        <text:list-item>
          <text:p text:style-name="P39">K. L. Clarkson, Algorithms for Closest-Point Problems (Computational Geometry), Ph.D. thesis, Stanford University, Palo Alto, CA, 1985. UMI Order Number: AAT 8506171. </text:p>
        </text:list-item>
        <text:list-item>
          <text:p text:style-name="P39">D. A. Anisi, Optimal Motion Control of a Ground Vehicle, Master’s thesis, Royal Institute of Technology (KTH), Stockholm, Sweden, 2003. </text:p>
        </text:list-item>
        <text:list-item>
          <text:p text:style-name="P39">H. Thornburg, Introduction to bayesian statistics, 2001. <text:span text:style-name="T40">URL: </text:span><text:a xlink:type="simple" xlink:href="http://ccrma.stanford.edu/jos/bayes/bayes.html" text:style-name="Internet_20_link" text:visited-style-name="Visited_20_Internet_20_Link"><text:span text:style-name="Internet_20_link"><text:span text:style-name="T40">http://ccrma.stanford.edu/jos/bayes/bayes.html</text:span></text:span></text:a><text:span text:style-name="T40">. </text:span></text:p>
        </text:list-item>
        <text:list-item>
          <text:p text:style-name="P39">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9">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9">B. Obama, A more perfect union, Video, 2008. URL: http://video.google.com/videoplay? docid=6528042696351994555. </text:p>
        </text:list-item>
        <text:list-item>
          <text:p text:style-name="P39">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9">N. Lee, Interview with bill kinder: January 13, 2005, Comput. Entertain. 3 (2005). doi:10.1145/1057270.1057278. </text:p>
        </text:list-item>
        <text:list-item>
          <text:p text:style-name="P39">J. Scientist, The fountain of youth, 2009. Patent No. 12345, Filed July 1st., 2008, Issued Aug. 9th., 2009. </text:p>
        </text:list-item>
        <text:list-item>
          <text:p text:style-name="P39">B. Rous, The enabling of digital libraries, Digital Libraries 12 (2008). To appear. </text:p>
        </text:list-item>
        <text:list-item>
          <text:p text:style-name="P39">M. Saeedi, M. S. Zamani, M. Sedighi, A library-based synthesis methodology for reversible logic, Microelectron. J. 41 (2010) 185–194. </text:p>
        </text:list-item>
        <text:list-item>
          <text:p text:style-name="P39">M. Saeedi, M. S. Zamani, M. Sedighi, Z. Sasanian, Synthesis of reversible circuit using cycle-based approach, J. Emerg. Technol. Comput. Syst. 6 (2010). </text:p>
        </text:list-item>
        <text:list-item>
          <text:p text:style-name="P39">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9">L. Hörmander, The analysis of linear partial di<text:span text:style-name="T26">ff</text:span>erential operators. IV, volume 275 of <text:s/>Grundlehren der Mathematischen Wissenschaften [Fundamental Principles of Mathematical Sciences], Springer-Verlag, Berlin, Germany, 1985. Fourier integral operators. </text:p>
        </text:list-item>
        <text:list-item>
          <text:p text:style-name="P39">L. Hörmander, The analysis of linear partial di<text:span text:style-name="T26">ff</text:span>erential operators. III, volume 275 of Grundlehren der Mathematischen Wissenschaften [Fundamental Principles of Mathematical Sciences], Springer-Verlag, Berlin, Germany, 1985. Pseudodierential operators. </text:p>
        </text:list-item>
        <text:list-item>
          <text:p text:style-name="P39"><text:soft-page-break/>IEEE, Ieee tcsc executive committee, in: Proceedings of the IEEE International Conference on Web Services, ICWS ’04, IEEE Computer Society, Washington, DC, USA, 2004, pp. 21–22. doi:10.1109/ICWS.2004.64. </text:p>
        </text:list-item>
        <text:list-item>
          <text:p text:style-name="P39">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9">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9">S. Anzaroot, A. McCallum, UMass citation field extraction dataset, 2013. <text:span text:style-name="T40">URL: </text:span><text:a xlink:type="simple" xlink:href="http://www.iesl.cs.umass.edu/data/data-umasscitationfield" text:style-name="Internet_20_link" text:visited-style-name="Visited_20_Internet_20_Link"><text:span text:style-name="Internet_20_link"><text:span text:style-name="T40">http://www.iesl.cs.umass.edu/data/data-umasscitationfield</text:span></text:span></text:a><text:span text:style-name="T40">. </text:span></text:p>
        </text:list-item>
      </text:list>
      <text:p text:style-name="P40"/>
      <text:list text:style-name="WWNum40">
        <text:list-header>
          <text:h text:style-name="P41" text:outline-level="1"><text:span text:style-name="T40"/></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text-indent="0.501cm"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423cm" fo:margin-bottom="0.318cm" style:contextual-spacing="false" fo:text-align="lef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chapter">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chapter">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chapter">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lef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lef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right="0cm" fo:margin-top="0.529cm" fo:margin-bottom="0cm" style:contextual-spacing="false" fo:text-align="left" style:justify-single-word="false" fo:orphans="2" fo:widows="2" fo:text-indent="0cm"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lef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text-indent="0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lef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lef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left" style:justify-single-word="false" fo:orphans="2" fo:widows="2" fo:text-indent="0cm"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cm" fo:margin-right="0cm" fo:margin-top="0cm" fo:margin-bottom="0.847cm" style:contextual-spacing="false" fo:text-align="left" style:justify-single-word="false" fo:orphans="2" fo:widows="2" fo:text-indent="2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tandard_20__28_WW_29_" style:display-name="Standard (WW)" style:family="paragraph">
      <style:paragraph-properties fo:margin-top="0cm" fo:margin-bottom="0.423cm" style:contextual-spacing="true" fo:line-height="110%" fo:text-align="justify" style:justify-single-word="false" fo:orphans="2" fo:widows="2" fo:hyphenation-ladder-count="no-limit" fo:hyphenation-keep="auto" loext:hyphenation-keep-type="column" loext:hyphenation-keep-line="false" fo:text-indent="0.501cm" style:auto-text-indent="false" style:vertical-align="baseline"/>
      <style:text-properties style:font-name="Libertinus Serif1" fo:font-family="'Libertinus Serif'" style:font-family-generic="roman" style:font-pitch="variable" fo:font-size="11pt" fo:language="en" fo:country="US" style:font-name-asian="Calibri1" style:font-family-asian="Calibri"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fo:font-family="Symbol" style:font-style-name="Regular" style:font-family-generic="roman" style:font-pitch="variable"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26</meta:editing-cycles>
    <meta:print-date>2021-03-21T00:36:00</meta:print-date>
    <meta:creation-date>2024-01-16T11:58:00</meta:creation-date>
    <dc:date>2026-05-07T13:43:22.514932500</dc:date>
    <meta:editing-duration>PT1H39M24S</meta:editing-duration>
    <meta:generator>LibreOffice/26.2.2.2$Windows_X86_64 LibreOffice_project/1f77d10d6938fd34972958f64b2bcfa54f8b1ba5</meta:generator>
    <meta:document-statistic meta:table-count="3" meta:image-count="3" meta:object-count="1" meta:page-count="8" meta:paragraph-count="191" meta:word-count="2427" meta:character-count="16259" meta:non-whitespace-character-count="14074"/>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